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arau" svg:font-family="Taarau" style:font-pitch="variable"/>
  </office:font-face-decls>
  <office:automatic-styles>
    <style:style style:name="P1" style:family="paragraph" style:parent-style-name="Text_20_body">
      <style:text-properties style:font-name="Taarau" fo:font-size="12pt" officeooo:rsid="00189e49" officeooo:paragraph-rsid="00189e49" style:font-size-asian="12pt" style:font-size-complex="12pt"/>
    </style:style>
    <style:style style:name="P2" style:family="paragraph" style:parent-style-name="Standard">
      <style:paragraph-properties fo:line-height="100%" fo:text-align="justify" style:justify-single-word="false"/>
      <style:text-properties style:font-name="Taarau" fo:font-size="12pt" officeooo:rsid="0012cd0a" officeooo:paragraph-rsid="00189e49" style:font-size-asian="12pt" style:font-size-complex="12pt"/>
    </style:style>
    <style:style style:name="P3" style:family="paragraph" style:parent-style-name="Standard">
      <style:paragraph-properties fo:text-align="justify" style:justify-single-word="false"/>
      <style:text-properties style:font-name="Taarau" fo:font-size="12pt" style:font-size-asian="12pt" style:font-size-complex="12pt"/>
    </style:style>
    <style:style style:name="P4" style:family="paragraph" style:parent-style-name="Standard">
      <style:paragraph-properties fo:margin-top="0in" fo:margin-bottom="0.222in" style:contextual-spacing="false" fo:text-align="justify" style:justify-single-word="false"/>
      <style:text-properties style:font-name="Taarau" fo:font-size="12pt" style:font-size-asian="12pt" style:font-size-complex="12pt"/>
    </style:style>
    <style:style style:name="P5" style:family="paragraph" style:parent-style-name="Standard">
      <style:paragraph-properties fo:margin-top="0in" fo:margin-bottom="0.111in" style:contextual-spacing="false" fo:text-align="justify" style:justify-single-word="false"/>
      <style:text-properties style:font-name="Taarau" fo:font-size="12pt" style:font-size-asian="12pt" style:font-size-complex="12pt"/>
    </style:style>
    <style:style style:name="T1" style:family="text">
      <style:text-properties officeooo:rsid="0014ef9a"/>
    </style:style>
    <style:style style:name="T2" style:family="text">
      <style:text-properties officeooo:rsid="003af32b"/>
    </style:style>
    <style:style style:name="T3" style:family="text">
      <style:text-properties officeooo:rsid="002ac321"/>
    </style:style>
    <style:style style:name="T4" style:family="text">
      <style:text-properties officeooo:rsid="001655f9"/>
    </style:style>
    <style:style style:name="T5" style:family="text">
      <style:text-properties officeooo:rsid="002813ab"/>
    </style:style>
    <style:style style:name="T6" style:family="text">
      <style:text-properties fo:color="#000000" loext:opacity="100%" fo:font-family="font1" style:font-family-generic="roman" style:font-pitch="variable" fo:font-size="18pt" style:text-underline-style="none" style:font-size-asian="18pt"/>
    </style:style>
    <style:style style:name="T7" style:family="text">
      <style:text-properties fo:color="#000000" loext:opacity="100%" style:text-underline-style="none"/>
    </style:style>
    <style:style style:name="T8" style:family="text">
      <style:text-properties fo:color="#000000" loext:opacity="100%" fo:font-family="font1" style:font-family-generic="roman" style:font-pitch="variable" fo:font-size="13pt" style:text-underline-style="none" style:font-size-asian="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fmitanaN Anaru Iti, kopisuNduAN do moxiNtoX,</text:p>
      <text:p text:style-name="P2"><text:span text:style-name="T1">poNYsuAY </text:span>tinuYdoX O dusaK diti do kopomuANdamaN di tiAgaK datuK <text:span text:style-name="T2">coX</text:span> taNY vuN goNsuhu ropoX kinabalu panalaD haDY do pitufbuxaN &amp; gama<text:span text:style-name="T3">soMpuqf</text:span> IH nopujulaN do kiniOpoN <text:span text:style-name="T4">miniAMpaY toxo huguAN vofkoN do poguN tokoW sabaH</text:span> <text:span text:style-name="T5">di ONtoK </text:span>nakaftuq guluD diOho ID soMbulaN, doNdoXW kinabalu di ONtoK koXYgonoM kosilaW do mahaS toNW gaMpamasi tokoW soYbu sizaM xatuS tuqf podoM OnoM.</text:p>
      <text:p text:style-name="P2"/>
      <text:p text:style-name="P2">siOMpokoN tagayo raNzaT pasoK momoguN &amp; buroL pogiflaxoN do toxoWluN saNdaD do pisoMpuruAN nofmuxaN do sarawaK, sabaH, &amp; malaya.</text:p>
      <text:p text:style-name="P2"/>
      <text:p text:style-name="P2">ponuridaxaN do sikuL poMYponu boroS buNduliwaN namoT Aqf OtolikudaN O boroS saNdaD wokoN. poxiNtutunaN do Iso gagariT saNdaD kopomogoritaN do buNduliwaN &amp; toxo boroS saNdaD wofkoN kopoxiXkafsaN niXkokotoN soMbinabaX soMpinusoW-ginumuAN do boroS tamiL, tabaY, &amp; siXkuX. kapaNtaxaN &amp; sokoduX do koluNduAN pisoMpuruAN moNtoK kagabasaN kitiwoyo &amp; kotunudaN do kotuMbayaNf saNdaD &amp; kopotiloMbusaN do kabaflaN koWbasanaN saNdaD. ponoriAN OrukuT do toxo mamuX saNdaD ID pomorunaN do laguwagu OtinagaS AkaSf pofmitanaN xaq Au poNYroNtoB, pomoriAN, toNsiAN, kotoSdoruD &amp; suAY po.</text:p>
      <text:p text:style-name="P2"/>
      <text:p text:style-name="P2">.watu pitoruAN tumanuD poninanaN.</text:p>
      <text:p text:style-name="P2"/>
      <text:p text:style-name="P2">tulukaN di koluNduAN molisiA</text:p>
      <text:p text:style-name="P2"/>
      <text:p text:style-name="P2">koYso, AgabaS waDY ID sabaH,</text:p>
      <text:p text:style-name="P2">koduO, tanaq suAX sabaH doNsuNdu do koluNduAN sabaH,</text:p>
      <text:p text:style-name="P2">kotolu, baniS pasoKmomoguN paNtaxoN &amp; toMposiON di koluNduAN,</text:p>
      <text:p text:style-name="P2"/>
      <text:p text:style-name="P2">koposuliAN dif mamatoS O toxo mogigiON suAX sokiD tumorodoK doDY koluNduAN molisiA.</text:p>
      <text:p text:style-name="P2"/>
      <text:p text:style-name="P2"/>
      <text:p text:style-name="P2"/>
      <text:p text:style-name="P2"/>
      <text:p text:style-name="P2"/>
      <text:p text:style-name="P2"/>
      <text:p text:style-name="P2"/>
      <text:p text:style-name="P3" loext:marker-style-name="T6"><text:soft-page-break/><text:span text:style-name="T7">sunuDtoXkoP tanaK sabaH,</text:span></text:p>
      <text:p text:style-name="P4" loext:marker-style-name="T8"><text:span text:style-name="T7">mogisoMpuf, somituxaG,</text:span><text:span text:style-name="T7"/></text:p>
      <text:p text:style-name="P5" loext:marker-style-name="T8"><text:span text:style-name="T7">yatiq,</text:span><text:span text:style-name="T7"/></text:p>
      <text:p text:style-name="P5" loext:marker-style-name="T8"><text:span text:style-name="T7">IH taxanaK sabaH, poNYsoMpuf ID koWpusaN pogiflaxoN tokoW do poguN diti &amp; kasaNtabaN ApaNtoD datiq do doNtoL daW, poXYkakaT baYno do poposunuDtoXkoP Iso paxaN wagu suAX susuyaN dotokoW, noYkoT linaDY kakaL IH sabaH Iso poguN kibatoS AW nokotuluK, Iso poguN AwanadaN do kituMpaY, ginixo, &amp; koWbasanaN, xaq noftuxaN do gunoS, doTf, &amp; kologosoN, xaq baYno, somituxaG, pataranoN datiq hiza koginakaNf diti doNdo kotiXkadaN.</text:span><text:span text:style-name="T7"/></text:p>
      <text:p text:style-name="P5" loext:marker-style-name="T8"><text:span text:style-name="T7">soxonuON sabaH di toxoWluN daW, dapuq daW, doNtoL daW, &amp; AXkaB daW OkoN sinoxonuAN di tokuri poNYtarahiq, xaq tuXkuS poNYtunuD doNWtikiD haXY nosusu ID tanaq diti, posunuDtoXkopoN datiq sabaH sumiliW Iso poguN If hoXgo pinaXgoR AlaNtoY manaPf do kogunasaN, ponudukaN popoNYsuNdu tikiD sinakagoN, &amp; tuAq do hinuyaN tokoW papalabaq do ginumuAN &amp; OkoN IH toxo kuri. AlapoN tokoW tikiD tanaK sabaH, do tikiD waDY, mogigiON, &amp; nawayaNf, do IXkakaT no ID koYsaNf, solodoN tokoW wagu tuMpaY datiq, poturidoxoN O kobodiAN, &amp; goritoN tokoW wayaNf kumaf kopoMYporiAN, pinaNtaX, &amp; pinuAwaX, pokiOnuON tokoW koluguAnaN IH motuL do kapaNtaxaN do tuluN tokoW, koluguAnaN IH Au popowiAW do tiAN soNdif nopo, xaq vinasi ginumuAN.</text:span><text:span text:style-name="T7"/></text:p>
      <text:p text:style-name="P5" loext:marker-style-name="T8"><text:span text:style-name="T7">nokinamaN piA tokoW di kogunasaN &amp; koginakaNf dumarapaS do sinakagoN, gumonoT kasari guAX tokoW do OkoriS moNtoK poguN diti, kohubayaNf tokoW doDY piniAdaX, hiniAB tokoW moNtoK koMYburuON, &amp; tupuS tokoW moNtoK poguN diti kakaL malaXtalaX po. ponoruON tokoW loxoN kumaf tikiD tuluN sabaH ID paxalapaN do kotuxagaN tokoW, panaXgalaX no IH ``galaX baNsa sabaH`` pamaxaY do kagagaqON sumaPf do IXgafpiAdaX, &amp; batoS kumaf sinakagoN AbaNtalaN do AW tokoW AsaNsaB. pologoso no muliXgoW Iti sunuDtoXkoP ID konuluhoN &amp; baXf, doNdoXW &amp; kaMpuX, korikoT ID tikiD guAX gumonoT moNtoK sabaH, doNdo no kotuxagaN, doNdo no koYsaNf, doNdo no ponogiAN do diMpotoN dotokoW.</text:span><text:span text:style-name="T7"/></text:p>
      <text:p text:style-name="P4" loext:marker-style-name="T8"><text:span text:style-name="T7">moNtoK sabaH, moNtoK toxoWluN disido, moNtoK doNtoL dotokoW,</text:span><text:span text:style-name="T7"/></text:p>
      <text:p text:style-name="P2"><text:span text:style-name="T7">.kakatadaN taxanaK saba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arau" svg:font-family="Taara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19:01:22.817444000</meta:creation-date>
    <dc:date>2026-06-13T19:06:55.329942000</dc:date>
    <meta:editing-duration>PT5M30S</meta:editing-duration>
    <meta:editing-cycles>5</meta:editing-cycles>
    <meta:generator>LibreOffice/25.8.1.1$MacOSX_AARCH64 LibreOffice_project/54047653041915e595ad4e45cccea684809c77b5</meta:generator>
    <meta:document-statistic meta:table-count="0" meta:image-count="0" meta:object-count="0" meta:page-count="2" meta:paragraph-count="18" meta:word-count="492" meta:character-count="3319" meta:non-whitespace-character-count="2845"/>
  </office:meta>
</office:document-meta>
</file>